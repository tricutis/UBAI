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BAI 2009</text:p>
      <text:p text:style-name="Standard"/>
      <text:p text:style-name="Standard"/>
      <text:list text:style-name="L1">
        <text:list-item>
          <text:p text:style-name="P1">Versicherung – Petra in Urlaub ab 15.1. mit Tel+mail auf UBAI Webseite</text:p>
        </text:list-item>
        <text:list-item>
          <text:p text:style-name="P1">Kosten jetzt höher ca 180,- aber 2 Zusatz-Versicherungen dabei</text:p>
        </text:list-item>
        <text:list-item>
          <text:p text:style-name="P1">Bitte an Petra zur Gegenüberstellung Vorteile/Nachteile zu Alternativen</text:p>
        </text:list-item>
      </text:list>
      <text:list text:style-name="L2">
        <text:list-item>
          <text:p text:style-name="P2">Jarhresbericht 2008</text:p>
        </text:list-item>
        <text:list-item>
          <text:p text:style-name="P2">Satzungsänderung Vorstand+Vereinssitz</text:p>
        </text:list-item>
        <text:list-item>
          <text:p text:style-name="P2">Verwendung Guthaben? Anzeige in Yoga aktuell?</text:p>
        </text:list-item>
        <text:list-item>
          <text:p text:style-name="P2">abhyanga-Werbung: UBAI Anteil enthält nicht mehr automatisch die Premium-Sparte „Ausbildung“</text:p>
        </text:list-item>
        <text:list-item>
          <text:p text:style-name="P2">Wie Vereinsarbeit in Zukunft gestalten?</text:p>
        </text:list-item>
        <text:list-item>
          <text:p text:style-name="P2">Mitglieder werden gebeten aktuelle Probleme zu melden</text:p>
          <text:p text:style-name="P2"/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Ingo Schmidt-Philipp</meta:initial-creator>
    <meta:creation-date>2009-12-15T16:10:14</meta:creation-date>
    <dc:creator>Ingo Schmidt-Philipp</dc:creator>
    <dc:date>2009-12-15T21:41:33</dc:date>
    <meta:printed-by>Ingo Schmidt-Philipp</meta:printed-by>
    <meta:print-date>2009-12-15T17:42:50</meta:print-date>
    <dc:language>de-DE</dc:language>
    <meta:editing-cycles>3</meta:editing-cycles>
    <meta:editing-duration>PT5H25M2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0" meta:word-count="68" meta:character-count="497"/>
  </office:meta>
</office:document-meta>
</file>