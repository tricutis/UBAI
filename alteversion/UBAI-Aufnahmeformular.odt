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AI Aufnahmeantrag </text:p>
      <text:p text:style-name="Standard"><text:s/></text:p>
      <text:p text:style-name="Standard">Ich möchte Mitglied im unabhängigen Berufsverband für Ayurveda und indigene Medizin </text:p>
      <text:p text:style-name="Standard">werden. </text:p>
      <text:p text:style-name="Standard"><text:s/></text:p>
      <text:p text:style-name="Standard">Vorname und Name: <text:s/>__________________________________ <text:s text:c="3"/></text:p>
      <text:p text:style-name="Standard"><text:s/></text:p>
      <text:p text:style-name="Standard">Anschrift: <text:s text:c="3"/>__________________________________ <text:s text:c="3"/></text:p>
      <text:p text:style-name="Standard"><text:s/></text:p>
      <text:p text:style-name="Standard">PLZ und Ort: <text:s text:c="3"/>__________________________________ <text:s text:c="3"/></text:p>
      <text:p text:style-name="Standard"><text:s/></text:p>
      <text:p text:style-name="Standard">Email-Adresse: <text:s/>__________________________________ <text:s text:c="3"/></text:p>
      <text:p text:style-name="Standard"><text:s/></text:p>
      <text:p text:style-name="Standard">Der UBAI unterscheidet für sich bislang folgende Ausbildungsrubriken: </text:p>
      <text:p text:style-name="Standard"><text:s/></text:p>
      <text:p text:style-name="Standard">1. <text:s/>Ayurveda Wellness Masseur/in </text:p>
      <text:p text:style-name="Standard">2. <text:s/>Ayurveda Therapeut/in (mindestens 5 Wochen Ausbildung) </text:p>
      <text:p text:style-name="Standard">3. <text:s/>Ayurveda Ernährungsberater/in oder Koch/Köchin </text:p>
      <text:p text:style-name="Standard">4. <text:s/>Yogalehrer/in / Yogatherapeut/in </text:p>
      <text:p text:style-name="Standard">5. <text:s/>Sonstige indigene Heilkunde </text:p>
      <text:p text:style-name="Standard">6. <text:s/>Fördermitglied ohne UBAI Berufsausbildung </text:p>
      <text:p text:style-name="Standard"><text:s/></text:p>
      <text:p text:style-name="Standard">Ich möchte gern in folgende Rubrik aufgenommen werden: <text:s/>________ </text:p>
      <text:p text:style-name="Standard">Ich befinde mich noch in der Ausbildung (J/N): <text:s text:c="5"/>________ </text:p>
      <text:p text:style-name="Standard"><text:s/></text:p>
      <text:p text:style-name="Standard">Meine Ausbildung war/ist bei (Institute/Lehrer/Orte) : <text:s/></text:p>
      <text:p text:style-name="Standard"><text:s/></text:p>
      <text:p text:style-name="Standard">________________________________________________________________ <text:s text:c="3"/></text:p>
      <text:p text:style-name="Standard"><text:s/></text:p>
      <text:p text:style-name="Standard">Stundenanzahl der Ausbildung (Praxis und Theorie): <text:s text:c="2"/>________________________ <text:s text:c="3"/></text:p>
      <text:p text:style-name="Standard"><text:s/></text:p>
      <text:p text:style-name="Standard">Mein Abschluss (Titel/Bezeichnung): <text:s text:c="8"/>________________________ <text:s/></text:p>
      <text:p text:style-name="Standard"><text:s/></text:p>
      <text:p text:style-name="Standard"><text:s/></text:p>
      <text:p text:style-name="Standard">Unterschrift: __________________________________ <text:s text:c="3"/></text:p>
      <text:p text:style-name="Standard"><text:s/></text:p>
      <text:p text:style-name="Standard"><text:s/></text:p>
      <text:p text:style-name="Standard">Der Mitgliedsbeitrag beträgt derzeit 30,- Euro im Jahr </text:p>
      <text:p text:style-name="Standard">Ich erteile hiermit Einzugsermächtigung für den Einzug des Mitgliedbeitrags <text:s/></text:p>
      <text:p text:style-name="Standard"><text:s/></text:p>
      <text:p text:style-name="Standard">IBAN: __________________________________ <text:s text:c="7"/></text:p>
      <text:p text:style-name="Standard"><text:s/></text:p>
      <text:p text:style-name="Standard">BIC: <text:s/>__________________________________ <text:s text:c="3"/></text:p>
      <text:p text:style-name="Standard">Kontoinhaber (falls abweichender Name): __________________________________ <text:s text:c="3"/></text:p>
      <text:p text:style-name="Standard"><text:s text:c="4"/></text:p>
      <text:p text:style-name="Standard">Unterschrift für Einzugsermächtigung: __________________________________ <text:s text:c="3"/></text:p>
      <text:p text:style-name="Standard"><text:s/></text:p>
      <text:p text:style-name="Standard">Bitte zurückschicken an: <text:s/></text:p>
      <text:p text:style-name="Standard">UBAI Berufsverband c/o Schmidt-Philipp, Linsen 3a, 87448 Waltenhofen <text:s/></text:p>
      <text:p text:style-name="Standard">oder per Fax 08379-929344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8:00:03.25</meta:creation-date>
    <meta:document-statistic meta:table-count="0" meta:image-count="0" meta:object-count="0" meta:page-count="1" meta:paragraph-count="50" meta:word-count="146" meta:character-count="1634"/>
    <dc:date>2017-05-16T18:25:52.67</dc:date>
    <meta:editing-duration>PT10M38S</meta:editing-duration>
    <meta:editing-cycles>1</meta:editing-cycles>
    <meta:generator>OpenOffice/4.0.1$Win32 OpenOffice.org_project/401m5$Build-9714</meta:generator>
  </office:meta>
</office:document-meta>
</file>